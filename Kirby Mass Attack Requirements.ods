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2.778cm"/>
    </style:style>
    <style:style style:name="co6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style:vertical-align="middle"/>
    </style:style>
    <style:style style:name="ce5" style:family="table-cell" style:parent-style-name="Default" style:data-style-name="N99"/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Amount of Kirby required" table:style-name="ta1"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Kirbys</text:p>
          </table:table-cell>
          <table:table-cell office:value-type="string" calcext:value-type="string">
            <text:p>Medals</text:p>
          </table:table-cell>
        </table:table-row>
        <table:table-row table:style-name="ro1">
          <table:table-cell office:value-type="string" calcext:value-type="string">
            <text:p>Green Ground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een Grounds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reen Ground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een Ground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reen Grounds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een Ground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een Ground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een Ground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reen Ground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een Ground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reen Grounds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andy Cany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ndy Cany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ndy Cany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ndy Canyon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ndy Canyon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ndy Canyon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andy Canyo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ndy Canyo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andy Canyo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andy Canyo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andy Canyon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andy Canyon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edede Resort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dede Resor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dede Reso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dede Resor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dede Reso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dede Resor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dede Resor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dede Resort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dede Resort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dede Resor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dede Resort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dede Resor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olcano Valley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olcano Valle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olcano Valle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olcano Valle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Volcano Valle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Volcano Valle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olcano Valle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olcano Valle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olcano Valle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olcano Valle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olcano Valley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olcano Valley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ecro Nebula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cro Nebul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cro Nebul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cro Nebul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cro Nebul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Kirby Mass Attack Requirements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Medal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Skull Keys</text:p>
          </table:table-cell>
          <table:table-cell office:value-type="string" calcext:value-type="string">
            <text:p>Kirbys</text:p>
          </table:table-cell>
          <table:table-cell office:value-type="string" calcext:value-type="string">
            <text:p>Jumbo Candy</text:p>
          </table:table-cell>
        </table:table-row>
        <table:table-row table:style-name="ro1">
          <table:table-cell table:style-name="ce7" office:value-type="string" calcext:value-type="string">
            <text:p>Green Ground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8"/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style-name="ce9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9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9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style-name="ce9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dy Cany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9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9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9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dede Reso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9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style-name="ce9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9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9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cano Valle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9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9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boolean" office:boolean-value="true" calcext:value-type="boolean">
            <text:p>TRUE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9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9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00-00-00</text:date>, <text:time style:data-style-name="N2" text:time-value="21:47:53.1533620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4:50:28.539046789</meta:creation-date>
    <dc:date>2026-04-22T21:49:59.748316367</dc:date>
    <meta:editing-duration>PT1H1M49S</meta:editing-duration>
    <meta:editing-cycles>13</meta:editing-cycles>
    <meta:generator>LibreOffice/24.2.7.2$Linux_X86_64 LibreOffice_project/420$Build-2</meta:generator>
    <meta:document-statistic meta:table-count="2" meta:cell-count="472" meta:object-count="0"/>
  </office:meta>
</office:document-meta>
</file>